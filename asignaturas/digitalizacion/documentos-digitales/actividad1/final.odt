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 style:master-page-name="First_20_Page">
      <style:paragraph-properties style:page-number="auto"/>
      <style:text-properties fo:font-size="38pt" officeooo:paragraph-rsid="0001f5a8" style:font-size-asian="38pt" style:font-size-complex="38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style:font-name="Liberation Sans" fo:font-size="11pt" style:font-size-asian="11pt" style:font-size-complex="11pt"/>
    </style:style>
    <style:style style:name="P4" style:family="paragraph" style:parent-style-name="Subtitle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Tecnológico: La evolución del almacenamiento digital</text:p>
      <text:p text:style-name="P4"/>
      <text:p text:style-name="P4">Análisis de soportes físicos, de estado sólido y sistemas en la nub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Nombre: David</text:p>
      <text:p text:style-name="P2">Fecha: 17/07/2026</text:p>
      <text:p text:style-name="P2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fo:color="#00008b" loext:opacity="100%" style:font-name="Liberation Sans" fo:font-family="'Liberation Sans'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Lucida Sans" style:font-family-complex="'Lucida Sans'" style:font-family-generic-complex="system" style:font-pitch-complex="variable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696969" loext:opacity="100%" fo:font-size="12pt" fo:font-style="italic" style:font-size-asian="12pt" style:font-style-asian="italic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1.5pt solid #00008b" fo:padding="1cm" fo:background-color="#e6e6fa" style:writing-mode="lr-tb" draw:fill="solid" draw:fill-color="#e6e6fa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6e6fa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7T16:31:28.775000000</meta:creation-date>
    <dc:date>2026-07-17T16:41:27.184000000</dc:date>
    <meta:editing-duration>PT9M58S</meta:editing-duration>
    <meta:editing-cycles>1</meta:editing-cycles>
    <meta:document-statistic meta:table-count="0" meta:image-count="0" meta:object-count="0" meta:page-count="3" meta:paragraph-count="4" meta:word-count="23" meta:character-count="158" meta:non-whitespace-character-count="139"/>
    <meta:generator>LibreOffice/7.2.1.2$Windows_X86_64 LibreOffice_project/87b77fad49947c1441b67c559c339af8f3517e22</meta:generator>
  </office:meta>
</office:document-meta>
</file>