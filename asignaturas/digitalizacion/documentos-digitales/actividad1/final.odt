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ans" fo:font-size="11pt" style:font-size-asian="11pt" style:font-size-complex="11pt"/>
    </style:style>
    <style:style style:name="P2" style:family="paragraph" style:parent-style-name="Subtitle">
      <style:text-properties fo:font-size="18pt" style:font-size-asian="18pt" style:font-size-complex="18pt"/>
    </style:style>
    <style:style style:name="P3" style:family="paragraph" style:parent-style-name="Heading" style:master-page-name="First_20_Page">
      <style:paragraph-properties style:page-number="auto"/>
      <style:text-properties fo:font-size="38pt" officeooo:paragraph-rsid="0001f5a8" style:font-size-asian="38pt" style:font-size-complex="38pt"/>
    </style:style>
    <style:style style:name="P4" style:family="paragraph" style:parent-style-name="Heading_20_1">
      <loext:graphic-properties draw:fill-gradient-name="gradient" draw:fill-hatch-name="hatch"/>
      <style:paragraph-properties fo:margin-top="0.42cm" fo:margin-bottom="0.499cm" style:contextual-spacing="false"/>
    </style:style>
    <style:style style:name="P5" style:family="paragraph" style:parent-style-name="Heading_20_2" style:list-style-name="">
      <style:paragraph-properties fo:text-align="start" style:justify-single-word="false"/>
      <style:text-properties officeooo:paragraph-rsid="000882e0"/>
    </style:style>
    <style:style style:name="P6" style:family="paragraph" style:parent-style-name="Heading_20_2">
      <style:paragraph-properties fo:break-before="page"/>
      <style:text-properties officeooo:paragraph-rsid="000882e0"/>
    </style:style>
    <style:style style:name="P7" style:family="paragraph" style:parent-style-name="Standard" style:master-page-name="Standard">
      <style:paragraph-properties fo:text-align="start" style:justify-single-word="false" style:page-number="auto"/>
      <style:text-properties style:font-name="Liberation Sans" fo:font-size="11pt" style:font-size-asian="11pt" style:font-size-complex="11pt"/>
    </style:style>
    <style:style style:name="P8" style:family="paragraph" style:parent-style-name="Text_20_body">
      <loext:graphic-properties draw:fill-gradient-name="gradient" draw:fill-hatch-name="hatch"/>
      <style:paragraph-properties fo:margin-top="0cm" fo:margin-bottom="0.349cm" style:contextual-spacing="false" fo:line-height="150%" fo:text-align="justify" style:justify-single-word="false">
        <style:drop-cap style:lines="3" style:distance="0.199cm"/>
      </style:paragraph-properties>
      <style:text-properties style:font-name="Liberation Serif" fo:font-size="12pt" style:font-size-asian="12pt" style:font-size-complex="12pt"/>
    </style:style>
    <style:style style:name="P9" style:family="paragraph" style:parent-style-name="Text_20_body">
      <style:text-properties officeooo:paragraph-rsid="00048ae1"/>
    </style:style>
    <style:style style:name="P10" style:family="paragraph" style:parent-style-name="Text_20_body">
      <loext:graphic-properties draw:fill="solid" draw:fill-color="#dcdcdc" draw:fill-gradient-name="gradient" draw:fill-hatch-name="hatch"/>
      <style:paragraph-properties fo:margin-left="1.499cm" fo:margin-right="1.499cm" fo:text-indent="0cm" style:auto-text-indent="false" fo:background-color="#dcdcdc" fo:padding-left="0.499cm" fo:padding-right="0.499cm" fo:padding-top="0.101cm" fo:padding-bottom="0.101cm" fo:border-left="3pt solid #00008b" fo:border-right="none" fo:border-top="none" fo:border-bottom="none" style:shadow="#808080 0.176cm 0.176cm"/>
      <style:text-properties officeooo:paragraph-rsid="00048ae1"/>
    </style:style>
    <style:style style:name="P11" style:family="paragraph" style:parent-style-name="Text_20_body">
      <style:text-properties officeooo:paragraph-rsid="000882e0"/>
    </style:style>
    <style:style style:name="P12" style:family="paragraph" style:parent-style-name="Text_20_body">
      <style:text-properties officeooo:paragraph-rsid="0008db52"/>
    </style:style>
    <style:style style:name="T1" style:family="text">
      <style:text-properties fo:font-weight="bold" style:font-weight-asian="bold" style:font-weight-complex="bold"/>
    </style:style>
    <style:style style:name="T2" style:family="text">
      <style:text-properties fo:color="#0000cd" loext:opacity="100%" fo:font-weight="bold" style:font-weight-asian="bold" style:font-weight-complex="bold"/>
    </style:style>
    <style:style style:name="T3" style:family="text">
      <style:text-properties fo:color="#00008b" loext:opacity="100%"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background-color="#ffebcd" loext:char-shading-value="0" style:font-style-asian="italic" style:font-style-complex="italic"/>
    </style:style>
    <style:style style:name="Sect1" style:family="section">
      <style:section-properties fo:background-color="#f5f5dc" text:dont-balance-text-columns="false" fo:margin-left="0.499cm" fo:margin-right="0.499cm" style:editable="false">
        <style:columns fo:column-count="2">
          <style:column style:rel-width="4818*" fo:start-indent="0cm" fo:end-indent="0.249cm"/>
          <style:column style:rel-width="4819*" fo:start-indent="0.249cm" fo:end-indent="0cm"/>
        </style:columns>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forme Tecnológico: La evolución del almacenamiento digital</text:p>
      <text:p text:style-name="P2"/>
      <text:p text:style-name="P2">Análisis de soportes físicos, de estado sólido y sistemas en la nub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Nombre: David</text:p>
      <text:p text:style-name="P1">Fecha: 17/07/2026</text:p>
      <text:h text:style-name="P4" text:outline-level="1"><text:soft-page-break/>1. Introducción al almacenamiento digital</text:h>
      <text:p text:style-name="P8">La forma de almacenar información digital ha evolucionado enormemente desde los primeros ordenadores personales. Durante las décadas de 1980 y 1990, los disquetes fueron uno de los principales medios de almacenamiento, permitiendo guardar y transportar archivos entre equipos. Sin embargo, su capacidad era muy limitada y resultaban sensibles a daños físicos y campos magnéticos. A medida que aumentaban las necesidades de almacenamiento, surgieron nuevas tecnologías capaces de guardar más información de forma más segura y rápida.</text:p>
      <text:p text:style-name="P9">Con el paso del tiempo, los <text:span text:style-name="T3">discos duros</text:span>, las memorias <text:span text:style-name="T5">USB</text:span>, las tarjetas de memoria y los discos ópticos fueron sustituyendo progresivamente a los disquetes. En la actualidad, el almacenamiento digital se caracteriza por ofrecer grandes capacidades, altas velocidades de acceso y una gran fiabilidad. Además, el <text:span text:style-name="T3">desarrollo de las unidades SSD</text:span> y de los servicios de almacenamiento en la nube permite acceder a los datos desde cualquier lugar y dispositivo conectado a Internet. Esta evolución ha transformado la manera en que guardamos, compartimos y protegemos nuestra información.</text:p>
      <text:p text:style-name="P10">Como dato curioso, el disquete de 3½ pulgadas más utilizado en los años 90 tenía una capacidad de solo 1,44 MB. Hoy en día, una fotografía tomada con un teléfono móvil puede ocupar más espacio que todo un disquete. Esto significa que una memoria USB de 64 GB puede almacenar el equivalente a más de 44.000 disquetes, mostrando el enorme avance que ha experimentado la tecnología de almacenamiento en apenas unas décadas.</text:p>
      <text:h text:style-name="P5" text:outline-level="2"/>
      <text:h text:style-name="P6" text:outline-level="2">1.1. Comparación de soportes magnéticos y ópticos</text:h>
      <text:section text:style-name="Sect1" text:name="Sección2">
        <text:p text:style-name="P12">Un <text:span text:style-name="T1">disco duro mecánico (HDD)</text:span> almacena la información en uno o varios discos magnéticos que giran a gran velocidad. Un brazo mecánico con un cabezal de lectura y escritura se desplaza sobre la superficie de los discos para leer o modificar los datos. La información se guarda mediante cambios en la orientación magnética de pequeñas zonas del disco. Cuando el ordenador necesita acceder a un archivo, el cabezal se sitúa sobre la posición adecuada y lee los datos almacenados. Aunque ofrecen gran capacidad a un precio reducido, los HDD son más lentos y sensibles a los golpes que las unidades SSD.</text:p>
        <text:p text:style-name="P12">Un <text:span text:style-name="T1">disco óptico, como un CD o un DVD</text:span>, almacena la información en una superficie formada por pequeñas marcas microscópicas. Para leer los datos, una unidad óptica proyecta un rayo láser sobre el disco mientras este gira. El sensor de la unidad detecta las diferencias en la reflexión de la luz y las interpreta como datos digitales. En los discos grabables, el láser también puede modificar una capa especial para almacenar nueva información. Los DVD pueden guardar más datos que los CD gracias a una mayor densidad de almacenamiento.</text:p>
        <text:p text:style-name="P12"/>
      </text:section>
      <text:p text:style-name="Text_20_body"/>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fo:color="#00008b" loext:opacity="100%" style:font-name="Liberation Sans" fo:font-family="'Liberation Sans'" style:font-family-generic="swiss" style:font-pitch="variable" fo:font-size="28pt" fo:font-weight="bold" style:font-name-asian="Microsoft YaHei" style:font-family-asian="'Microsoft YaHei'" style:font-family-generic-asian="system" style:font-pitch-asian="variable" style:font-size-asian="28pt" style:font-weight-asian="bold" style:font-name-complex="Lucida Sans" style:font-family-complex="'Lucida Sans'" style:font-family-generic-complex="system" style:font-pitch-complex="variable" style:font-size-complex="28pt" style:font-weight-complex="bold"/>
    </style:style>
    <style:style style:name="Text_20_body" style:display-name="Text body" style:family="paragraph" style:parent-style-name="Standard" style:class="text">
      <loext:graphic-properties draw:fill-gradient-name="gradient" draw:fill-hatch-name="hatch"/>
      <style:paragraph-properties fo:margin-left="0cm" fo:margin-right="0cm" fo:margin-top="0cm" fo:margin-bottom="0.349cm" style:contextual-spacing="false" fo:line-height="150%" fo:text-align="justify" style:justify-single-word="false" fo:text-indent="1.251cm" style:auto-text-indent="false"/>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696969" loext:opacity="100%" fo:font-size="12pt" fo:font-style="italic" style:font-size-asian="12pt" style:font-style-asian="italic" style:font-size-complex="12pt" style:font-style-complex="italic"/>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fo:font-size="14pt" fo:font-weight="bold" officeooo:rsid="0007aa91"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order="1.5pt solid #00008b" fo:padding="1cm" fo:background-color="#e6e6fa" style:writing-mode="lr-tb" style:layout-grid-color="#c0c0c0" style:layout-grid-lines="20" style:layout-grid-base-height="0.706cm" style:layout-grid-ruby-height="0.353cm" style:layout-grid-mode="none" style:layout-grid-ruby-below="false" style:layout-grid-print="false" style:layout-grid-display="false" draw:fill="solid" draw:fill-color="#e6e6fa"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e6e6fa" draw:opacity="100%"/>
    </style:style>
  </office:automatic-styles>
  <office:master-styles>
    <style:master-page style:name="Standard" style:page-layout-name="Mpm1" draw:style-name="Mdp1"/>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17T16:31:28.775000000</meta:creation-date>
    <dc:date>2026-07-20T17:33:01.139000000</dc:date>
    <meta:editing-duration>PT52M13S</meta:editing-duration>
    <meta:editing-cycles>16</meta:editing-cycles>
    <meta:generator>LibreOffice/7.2.1.2$Windows_X86_64 LibreOffice_project/87b77fad49947c1441b67c559c339af8f3517e22</meta:generator>
    <meta:document-statistic meta:table-count="0" meta:image-count="0" meta:object-count="0" meta:page-count="4" meta:paragraph-count="11" meta:word-count="462" meta:character-count="2911" meta:non-whitespace-character-count="2461"/>
  </office:meta>
</office:document-meta>
</file>